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1" style:font-size-complex="7pt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1" style:font-size-complex="7pt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2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3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54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55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5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5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5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5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6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61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62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6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64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65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6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6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6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6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7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71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72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73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23" draw:name="Control 5" draw:style-name="gr3" draw:text-style-name="P74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24" draw:name="Control 6" draw:style-name="gr3" draw:text-style-name="P74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5" draw:name="Control 7" draw:style-name="gr3" draw:text-style-name="P74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6" draw:name="Control 8" draw:style-name="gr3" draw:text-style-name="P74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7" draw:name="Control 9" draw:style-name="gr3" draw:text-style-name="P74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8" draw:name="Control 1" draw:style-name="gr3" draw:text-style-name="P74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9" draw:name="Control 3" draw:style-name="gr3" draw:text-style-name="P74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7" draw:name="Control 4" draw:style-name="gr3" draw:text-style-name="P74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8" draw:name="Control 12" draw:style-name="gr3" draw:text-style-name="P74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9" draw:name="Control 20" draw:style-name="gr3" draw:text-style-name="P74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20" draw:name="Control 28" draw:style-name="gr2" draw:text-style-name="P74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21" draw:name="Control 28" draw:style-name="gr1" draw:text-style-name="P74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22" draw:name="Control 14" draw:style-name="gr1" draw:text-style-name="P74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ext:p text:style-name="P7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61">Módulo profesional</text:p>
          </table:table-cell>
          <table:table-cell table:style-name="Tabla6.A1" office:value-type="string">
            <text:p text:style-name="P36"><draw:control text:anchor-type="as-char" draw:z-index="31" draw:name="Control 10" draw:style-name="gr3" draw:text-style-name="P74" svg:width="8.238cm" svg:height="0.722cm" draw:control="control17"/></text:p>
          </table:table-cell>
          <table:table-cell table:style-name="Tabla6.A1" office:value-type="string">
            <text:p text:style-name="P56">Convocatoria</text:p>
          </table:table-cell>
          <table:table-cell table:style-name="Tabla6.A1" office:value-type="string">
            <text:p text:style-name="P47"><draw:control text:anchor-type="as-char" draw:z-index="32" draw:name="Control 11" draw:style-name="gr3" draw:text-style-name="P74" svg:width="0.773cm" svg:height="0.722cm" draw:control="control18"/></text:p>
          </table:table-cell>
          <table:table-cell table:style-name="Tabla6.A1" office:value-type="string">
            <text:p text:style-name="P56">Cualificación</text:p>
          </table:table-cell>
          <table:table-cell table:style-name="Tabla6.F1" office:value-type="string">
            <text:p text:style-name="P47"><draw:control text:anchor-type="as-char" draw:z-index="33" draw:name="Control 13" draw:style-name="gr3" draw:text-style-name="P74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61">Valoración da aprendizaxe</text:p>
          </table:table-cell>
          <table:table-cell table:style-name="Tabla6.B2" table:number-columns-spanned="5" office:value-type="string">
            <text:p text:style-name="P41"><draw:control text:anchor-type="as-char" draw:z-index="34" draw:name="Control 15" draw:style-name="gr2" draw:text-style-name="P74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61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41"><draw:control text:anchor-type="as-char" svg:y="-0.79cm" draw:z-index="35" draw:name="Control 16" draw:style-name="gr1" draw:text-style-name="P74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66">Medidas de atención á diversidade adoptadas</text:p>
          </table:table-cell>
          <table:table-cell table:style-name="Tabla6.B2" table:number-columns-spanned="5" office:value-type="string">
            <text:p text:style-name="P41"><draw:control text:anchor-type="as-char" svg:y="-0.79cm" draw:z-index="36" draw:name="Control 19" draw:style-name="gr1" draw:text-style-name="P74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ext:p text:style-name="P71"/>
      <text:p text:style-name="P72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62">Módulo profesional</text:p>
          </table:table-cell>
          <table:table-cell table:style-name="Tabla7.A1" office:value-type="string">
            <text:p text:style-name="P37"><draw:control text:anchor-type="as-char" draw:z-index="37" draw:name="Control 21" draw:style-name="gr3" draw:text-style-name="P74" svg:width="8.238cm" svg:height="0.722cm" draw:control="control23"/></text:p>
          </table:table-cell>
          <table:table-cell table:style-name="Tabla7.A1" office:value-type="string">
            <text:p text:style-name="P57">Convocatoria</text:p>
          </table:table-cell>
          <table:table-cell table:style-name="Tabla7.A1" office:value-type="string">
            <text:p text:style-name="P48"><draw:control text:anchor-type="as-char" draw:z-index="38" draw:name="Control 22" draw:style-name="gr3" draw:text-style-name="P74" svg:width="0.773cm" svg:height="0.722cm" draw:control="control24"/></text:p>
          </table:table-cell>
          <table:table-cell table:style-name="Tabla7.A1" office:value-type="string">
            <text:p text:style-name="P57">Cualificación</text:p>
          </table:table-cell>
          <table:table-cell table:style-name="Tabla7.F1" office:value-type="string">
            <text:p text:style-name="P48"><draw:control text:anchor-type="as-char" draw:z-index="39" draw:name="Control 23" draw:style-name="gr3" draw:text-style-name="P74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62">Valoración da aprendizaxe</text:p>
          </table:table-cell>
          <table:table-cell table:style-name="Tabla7.B2" table:number-columns-spanned="5" office:value-type="string">
            <text:p text:style-name="P42"><draw:control text:anchor-type="as-char" draw:z-index="40" draw:name="Control 24" draw:style-name="gr2" draw:text-style-name="P74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62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42"><draw:control text:anchor-type="as-char" svg:y="-0.79cm" draw:z-index="41" draw:name="Control 25" draw:style-name="gr1" draw:text-style-name="P74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67">Medidas de atención á diversidade adoptadas</text:p>
          </table:table-cell>
          <table:table-cell table:style-name="Tabla7.B2" table:number-columns-spanned="5" office:value-type="string">
            <text:p text:style-name="P42"><draw:control text:anchor-type="as-char" svg:y="-0.79cm" draw:z-index="42" draw:name="Control 26" draw:style-name="gr1" draw:text-style-name="P74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63">Módulo profesional</text:p>
          </table:table-cell>
          <table:table-cell table:style-name="Tabla8.A1" office:value-type="string">
            <text:p text:style-name="P38"><draw:control text:anchor-type="as-char" draw:z-index="43" draw:name="Control 27" draw:style-name="gr3" draw:text-style-name="P74" svg:width="8.238cm" svg:height="0.722cm" draw:control="control29"/></text:p>
          </table:table-cell>
          <table:table-cell table:style-name="Tabla8.A1" office:value-type="string">
            <text:p text:style-name="P58">Convocatoria</text:p>
          </table:table-cell>
          <table:table-cell table:style-name="Tabla8.A1" office:value-type="string">
            <text:p text:style-name="P49"><draw:control text:anchor-type="as-char" draw:z-index="44" draw:name="Control 29" draw:style-name="gr3" draw:text-style-name="P74" svg:width="0.773cm" svg:height="0.722cm" draw:control="control30"/></text:p>
          </table:table-cell>
          <table:table-cell table:style-name="Tabla8.A1" office:value-type="string">
            <text:p text:style-name="P58">Cualificación</text:p>
          </table:table-cell>
          <table:table-cell table:style-name="Tabla8.F1" office:value-type="string">
            <text:p text:style-name="P49"><draw:control text:anchor-type="as-char" draw:z-index="45" draw:name="Control 30" draw:style-name="gr3" draw:text-style-name="P74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63">Valoración da aprendizaxe</text:p>
          </table:table-cell>
          <table:table-cell table:style-name="Tabla8.B2" table:number-columns-spanned="5" office:value-type="string">
            <text:p text:style-name="P43"><draw:control text:anchor-type="as-char" draw:z-index="46" draw:name="Control 31" draw:style-name="gr2" draw:text-style-name="P74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63">Actividades de recuperación <text:span text:style-name="T15">propostas</text:span></text:p>
          </table:table-cell>
          <table:table-cell table:style-name="Tabla8.B2" table:number-columns-spanned="5" office:value-type="string">
            <text:p text:style-name="P43"><draw:control text:anchor-type="as-char" svg:y="-0.79cm" draw:z-index="47" draw:name="Control 32" draw:style-name="gr1" draw:text-style-name="P74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68">Medidas de atención á diversidade adoptadas</text:p>
          </table:table-cell>
          <table:table-cell table:style-name="Tabla8.B2" table:number-columns-spanned="5" office:value-type="string">
            <text:p text:style-name="P43"><draw:control text:anchor-type="as-char" svg:y="-0.79cm" draw:z-index="48" draw:name="Control 33" draw:style-name="gr1" draw:text-style-name="P74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64">Módulo profesional</text:p>
          </table:table-cell>
          <table:table-cell table:style-name="Tabla9.A1" office:value-type="string">
            <text:p text:style-name="P39"><draw:control text:anchor-type="as-char" draw:z-index="49" draw:name="Control 34" draw:style-name="gr3" draw:text-style-name="P74" svg:width="8.238cm" svg:height="0.722cm" draw:control="control35"/></text:p>
          </table:table-cell>
          <table:table-cell table:style-name="Tabla9.A1" office:value-type="string">
            <text:p text:style-name="P59">Convocatoria</text:p>
          </table:table-cell>
          <table:table-cell table:style-name="Tabla9.A1" office:value-type="string">
            <text:p text:style-name="P50"><draw:control text:anchor-type="as-char" draw:z-index="50" draw:name="Control 35" draw:style-name="gr3" draw:text-style-name="P74" svg:width="0.773cm" svg:height="0.722cm" draw:control="control36"/></text:p>
          </table:table-cell>
          <table:table-cell table:style-name="Tabla9.A1" office:value-type="string">
            <text:p text:style-name="P59">Cualificación</text:p>
          </table:table-cell>
          <table:table-cell table:style-name="Tabla9.F1" office:value-type="string">
            <text:p text:style-name="P50"><draw:control text:anchor-type="as-char" draw:z-index="51" draw:name="Control 36" draw:style-name="gr3" draw:text-style-name="P74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64">Valoración da aprendizaxe</text:p>
          </table:table-cell>
          <table:table-cell table:style-name="Tabla9.B2" table:number-columns-spanned="5" office:value-type="string">
            <text:p text:style-name="P44"><draw:control text:anchor-type="as-char" draw:z-index="52" draw:name="Control 37" draw:style-name="gr2" draw:text-style-name="P74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64">Actividades de recuperación <text:span text:style-name="T15">propostas</text:span></text:p>
          </table:table-cell>
          <table:table-cell table:style-name="Tabla9.B2" table:number-columns-spanned="5" office:value-type="string">
            <text:p text:style-name="P44"><draw:control text:anchor-type="as-char" svg:y="-0.79cm" draw:z-index="53" draw:name="Control 38" draw:style-name="gr1" draw:text-style-name="P74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69">Medidas de atención á diversidade adoptadas</text:p>
          </table:table-cell>
          <table:table-cell table:style-name="Tabla9.B2" table:number-columns-spanned="5" office:value-type="string">
            <text:p text:style-name="P44"><draw:control text:anchor-type="as-char" svg:y="-0.79cm" draw:z-index="54" draw:name="Control 39" draw:style-name="gr1" draw:text-style-name="P74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p text:style-name="P73"/>
      <text:p text:style-name="P73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65">Módulo profesional</text:p>
          </table:table-cell>
          <table:table-cell table:style-name="Tabla10.A1" office:value-type="string">
            <text:p text:style-name="P40"><draw:control text:anchor-type="as-char" draw:z-index="55" draw:name="Control 40" draw:style-name="gr3" draw:text-style-name="P74" svg:width="8.238cm" svg:height="0.722cm" draw:control="control41"/></text:p>
          </table:table-cell>
          <table:table-cell table:style-name="Tabla10.A1" office:value-type="string">
            <text:p text:style-name="P60">Convocatoria</text:p>
          </table:table-cell>
          <table:table-cell table:style-name="Tabla10.A1" office:value-type="string">
            <text:p text:style-name="P51"><draw:control text:anchor-type="as-char" draw:z-index="56" draw:name="Control 41" draw:style-name="gr3" draw:text-style-name="P74" svg:width="0.773cm" svg:height="0.722cm" draw:control="control42"/></text:p>
          </table:table-cell>
          <table:table-cell table:style-name="Tabla10.A1" office:value-type="string">
            <text:p text:style-name="P60">Cualificación</text:p>
          </table:table-cell>
          <table:table-cell table:style-name="Tabla10.F1" office:value-type="string">
            <text:p text:style-name="P51"><draw:control text:anchor-type="as-char" draw:z-index="57" draw:name="Control 42" draw:style-name="gr3" draw:text-style-name="P74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65">Valoración da aprendizaxe</text:p>
          </table:table-cell>
          <table:table-cell table:style-name="Tabla10.B2" table:number-columns-spanned="5" office:value-type="string">
            <text:p text:style-name="P45"><draw:control text:anchor-type="as-char" draw:z-index="58" draw:name="Control 43" draw:style-name="gr2" draw:text-style-name="P74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65">Actividades de recuperación <text:span text:style-name="T15">propostas</text:span></text:p>
          </table:table-cell>
          <table:table-cell table:style-name="Tabla10.B2" table:number-columns-spanned="5" office:value-type="string">
            <text:p text:style-name="P45"><draw:control text:anchor-type="as-char" svg:y="-0.79cm" draw:z-index="59" draw:name="Control 44" draw:style-name="gr1" draw:text-style-name="P74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70">Medidas de atención á diversidade adoptadas</text:p>
          </table:table-cell>
          <table:table-cell table:style-name="Tabla10.B2" table:number-columns-spanned="5" office:value-type="string">
            <text:p text:style-name="P45"><draw:control text:anchor-type="as-char" svg:y="-0.79cm" draw:z-index="60" draw:name="Control 45" draw:style-name="gr1" draw:text-style-name="P74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73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<draw:control text:anchor-type="as-char" svg:y="-0.138cm" draw:z-index="30" draw:name="Control 2" draw:style-name="gr1" draw:text-style-name="P74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5" draw:name="Control 17" draw:style-name="gr3" draw:text-style-name="P74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6" draw:name="Control 18" draw:style-name="gr3" draw:text-style-name="P74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5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8"><draw:image xlink:href="Pictures/100000000000064700000429FC701CB86886B9EE.png" xlink:type="simple" xlink:show="embed" xlink:actuate="onLoad" draw:mime-type="image/png"/></draw:frame><draw:line text:anchor-type="char" draw:z-index="11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2"><draw:text-box><text:p text:style-name="MP10"><text:span text:style-name="MT7">Páxina</text:span><text:span text:style-name="MT8"> </text:span><text:span text:style-name="MT9"><text:page-number text:select-page="current">1</text:page-number></text:span><text:span text:style-name="MT8"><text:s/></text:span><text:span text:style-name="MT7">de</text:span><text:span text:style-name="MT8"> </text:span><text:span text:style-name="MT9"><text:page-count style:num-format="1">3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5:44.535000000</dc:date>
    <meta:print-date>2026-06-17T14:12:58.373442700</meta:print-date>
    <meta:editing-cycles>77</meta:editing-cycles>
    <meta:editing-duration>PT8H4M7S</meta:editing-duration>
    <meta:generator>LibreOffice/7.3.3.2$Windows_X86_64 LibreOffice_project/d1d0ea68f081ee2800a922cac8f79445e4603348</meta:generator>
    <meta:printed-by>Archivos PDF</meta:printed-by>
    <meta:document-statistic meta:table-count="10" meta:image-count="2" meta:object-count="0" meta:page-count="3" meta:paragraph-count="98" meta:word-count="220" meta:character-count="1679" meta:non-whitespace-character-count="1504"/>
  </office:meta>
</office:document-meta>
</file>